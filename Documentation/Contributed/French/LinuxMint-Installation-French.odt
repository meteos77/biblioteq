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text-properties style:font-name="Noto Serif" fo:font-size="14pt" style:font-size-asian="14pt" style:font-size-complex="14pt"/>
    </style:style>
    <style:style style:name="P4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5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6" style:family="paragraph" style:parent-style-name="Preformatted_20_Text">
      <style:text-properties style:font-name="Noto Sans Display" fo:font-size="14pt" style:font-size-asian="14pt" style:font-size-complex="14pt"/>
    </style:style>
    <style:style style:name="P7" style:family="paragraph" style:parent-style-name="Preformatted_20_Text">
      <style:text-properties style:font-name="Noto Sans Display" fo:font-size="14pt" officeooo:paragraph-rsid="0011659a" style:font-size-asian="14pt" style:font-size-complex="14pt"/>
    </style:style>
    <style:style style:name="P8" style:family="paragraph" style:parent-style-name="Preformatted_20_Text">
      <style:text-properties style:font-name="Noto Sans Display" fo:font-size="14pt" officeooo:paragraph-rsid="00143f20" style:font-size-asian="14pt" style:font-size-complex="14pt"/>
    </style:style>
    <style:style style:name="P9" style:family="paragraph" style:parent-style-name="Preformatted_20_Text">
      <style:text-properties style:font-name="Noto Sans Display" fo:font-size="14pt" officeooo:paragraph-rsid="001581aa" style:font-size-asian="14pt" style:font-size-complex="14pt"/>
    </style:style>
    <style:style style:name="P10" style:family="paragraph" style:parent-style-name="Preformatted_20_Text">
      <style:text-properties style:font-name="Noto Sans Display" fo:font-size="14pt" officeooo:paragraph-rsid="00177de7" style:font-size-asian="14pt" style:font-size-complex="14pt"/>
    </style:style>
    <style:style style:name="P11" style:family="paragraph" style:parent-style-name="Preformatted_20_Text">
      <style:text-properties style:font-name="Noto Sans Display" fo:font-size="14pt" officeooo:paragraph-rsid="0017cb30" style:font-size-asian="14pt" style:font-size-complex="14pt"/>
    </style:style>
    <style:style style:name="P12" style:family="paragraph" style:parent-style-name="Text_20_body">
      <style:text-properties style:font-name="Noto Sans Display" fo:font-size="14pt" officeooo:paragraph-rsid="0017cb30" style:font-size-asian="14pt" style:font-size-complex="14pt"/>
    </style:style>
    <style:style style:name="P13" style:family="paragraph" style:parent-style-name="Preformatted_20_Text">
      <style:text-properties style:font-name="Noto Sans Display" fo:font-size="14pt" officeooo:paragraph-rsid="00211f2f" style:font-size-asian="14pt" style:font-size-complex="14pt"/>
    </style:style>
    <style:style style:name="P14" style:family="paragraph" style:parent-style-name="Preformatted_20_Text">
      <style:text-properties style:font-name="Noto Sans Display" fo:font-size="14pt" officeooo:paragraph-rsid="002152e8" style:font-size-asian="14pt" style:font-size-complex="14pt"/>
    </style:style>
    <style:style style:name="P15" style:family="paragraph" style:parent-style-name="Preformatted_20_Text">
      <style:paragraph-properties fo:text-align="center" style:justify-single-word="false"/>
      <style:text-properties style:font-name="Noto Sans Display" fo:font-size="14pt" officeooo:paragraph-rsid="002152e8" style:font-size-asian="14pt" style:font-size-complex="14pt"/>
    </style:style>
    <style:style style:name="P16" style:family="paragraph" style:parent-style-name="Preformatted_20_Text">
      <style:paragraph-properties fo:text-align="start" style:justify-single-word="false"/>
      <style:text-properties style:font-name="Noto Sans Display" fo:font-size="14pt" officeooo:paragraph-rsid="002152e8" style:font-size-asian="14pt" style:font-size-complex="14pt"/>
    </style:style>
    <style:style style:name="P17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18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19" style:family="paragraph" style:parent-style-name="Preformatted_20_Text">
      <style:paragraph-properties fo:line-height="115%"/>
      <style:text-properties style:font-name="Noto Sans Display" fo:font-size="14pt" officeooo:rsid="000f60ab" officeooo:paragraph-rsid="000f60ab" fo:background-color="#cccccc" style:font-size-asian="14pt" style:font-size-complex="14pt"/>
    </style:style>
    <style:style style:name="P20" style:family="paragraph" style:parent-style-name="Preformatted_20_Text">
      <style:paragraph-properties fo:line-height="115%"/>
      <style:text-properties style:font-name="Noto Sans Display" fo:font-size="14pt" officeooo:rsid="000f60ab" officeooo:paragraph-rsid="0031f55f" fo:background-color="#cccccc" style:font-size-asian="14pt" style:font-size-complex="14pt"/>
    </style:style>
    <style:style style:name="P21" style:family="paragraph" style:parent-style-name="Preformatted_20_Text">
      <style:text-properties style:font-name="Noto Sans Display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style:font-name="Noto Sans Display" fo:font-size="14pt" fo:font-weight="normal" officeooo:rsid="0011655d" officeooo:paragraph-rsid="00143f20" style:font-size-asian="14pt" style:font-weight-asian="normal" style:font-size-complex="14pt" style:font-weight-complex="normal"/>
    </style:style>
    <style:style style:name="P23" style:family="paragraph" style:parent-style-name="Preformatted_20_Text">
      <style:text-properties style:font-name="Noto Sans Display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Noto Sans Display" fo:font-size="14pt" fo:font-weight="normal" officeooo:rsid="0011659a" officeooo:paragraph-rsid="0011659a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Noto Sans Display" fo:font-size="14pt" fo:font-weight="normal" officeooo:rsid="0011659a" officeooo:paragraph-rsid="00211f2f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Noto Sans Display" fo:font-size="14pt" fo:font-weight="normal" officeooo:rsid="0012d0b4" officeooo:paragraph-rsid="0012d0b4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Noto Sans Display" fo:font-size="14pt" fo:font-weight="normal" officeooo:rsid="0012d0b4" officeooo:paragraph-rsid="00211f2f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Noto Sans Display" fo:font-size="14pt" fo:font-weight="bold" officeooo:rsid="001b841c" officeooo:paragraph-rsid="001b841c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Noto Sans Display" fo:font-size="14pt" fo:font-weight="bold" officeooo:rsid="001b841c" officeooo:paragraph-rsid="00211f2f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Noto Sans Display" officeooo:paragraph-rsid="0011659a"/>
    </style:style>
    <style:style style:name="P31" style:family="paragraph" style:parent-style-name="Preformatted_20_Text">
      <style:text-properties style:font-name="Noto Sans Display" officeooo:paragraph-rsid="00211f2f"/>
    </style:style>
    <style:style style:name="P32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34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36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8" style:family="paragraph" style:parent-style-name="Preformatted_20_Text">
      <style:text-properties style:font-name="Nimbus Sans" fo:font-size="14pt" officeooo:rsid="0011655d" officeooo:paragraph-rsid="0011655d" style:font-size-asian="14pt" style:font-size-complex="14pt"/>
    </style:style>
    <style:style style:name="P39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41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11655d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style:font-name="Nimbus Sans" fo:font-size="14pt" fo:font-weight="bold" officeooo:rsid="001b241e" officeooo:paragraph-rsid="001b241e" style:font-size-asian="14pt" style:font-weight-asian="bold" style:font-size-complex="14pt" style:font-weight-complex="bold"/>
    </style:style>
    <style:style style:name="P45" style:family="paragraph" style:parent-style-name="Preformatted_20_Text">
      <style:text-properties style:font-name="Nimbus Sans" fo:font-size="14pt" fo:font-weight="bold" officeooo:rsid="001f5b7b" officeooo:paragraph-rsid="001f5b7b" style:font-size-asian="14pt" style:font-weight-asian="bold" style:font-size-complex="14pt" style:font-weight-complex="bold"/>
    </style:style>
    <style:style style:name="P46" style:family="paragraph" style:parent-style-name="Preformatted_20_Text">
      <style:text-properties style:font-name="Nimbus Sans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47" style:family="paragraph" style:parent-style-name="Preformatted_20_Text">
      <style:text-properties style:font-name="Nimbus Sans" fo:font-size="14pt" fo:font-weight="normal" officeooo:rsid="0011655d" officeooo:paragraph-rsid="0011659a" style:font-size-asian="14pt" style:font-weight-asian="normal" style:font-size-complex="14pt" style:font-weight-complex="normal"/>
    </style:style>
    <style:style style:name="P48" style:family="paragraph" style:parent-style-name="Preformatted_20_Text">
      <style:text-properties style:font-name="Nimbus Sans" fo:font-size="14pt" fo:font-weight="normal" officeooo:rsid="0011655d" officeooo:paragraph-rsid="001b241e" style:font-size-asian="14pt" style:font-weight-asian="normal" style:font-size-complex="14pt" style:font-weight-complex="normal"/>
    </style:style>
    <style:style style:name="P49" style:family="paragraph" style:parent-style-name="Preformatted_20_Text">
      <style:text-properties style:font-name="Nimbus Sans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50" style:family="paragraph" style:parent-style-name="Text_20_body">
      <style:text-properties officeooo:paragraph-rsid="001b841c"/>
    </style:style>
    <style:style style:name="P51" style:family="paragraph" style:parent-style-name="Preformatted_20_Text">
      <style:text-properties style:font-name="Noto Sans Display Condensed" fo:font-size="14pt" officeooo:rsid="002a5855" officeooo:paragraph-rsid="002a5855" style:font-size-asian="14pt" style:font-size-complex="14pt"/>
    </style:style>
    <style:style style:name="P52" style:family="paragraph" style:parent-style-name="Preformatted_20_Text">
      <style:paragraph-properties fo:text-align="center" style:justify-single-word="false"/>
      <style:text-properties style:font-name="Noto Sans Display Condensed" fo:font-size="16pt" fo:font-weight="bold" officeooo:rsid="002a5855" officeooo:paragraph-rsid="002a5855" style:font-size-asian="16pt" style:font-weight-asian="bold" style:font-size-complex="16pt" style:font-weight-complex="bold"/>
    </style:style>
    <style:style style:name="P53" style:family="paragraph" style:parent-style-name="Preformatted_20_Text">
      <style:text-properties style:font-name="Noto Sans Display Condensed" fo:font-size="15pt" officeooo:rsid="002a5855" officeooo:paragraph-rsid="002a5855" style:font-size-asian="15pt" style:font-size-complex="15pt"/>
    </style:style>
    <style:style style:name="P54" style:family="paragraph" style:parent-style-name="Heading_20_3">
      <style:paragraph-properties fo:text-align="center" style:justify-single-word="false"/>
    </style:style>
    <style:style style:name="P55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56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57" style:family="paragraph" style:parent-style-name="Heading_20_3">
      <style:paragraph-properties fo:margin-top="0.549cm" fo:margin-bottom="0.513cm" style:contextual-spacing="false" fo:line-height="100%" fo:text-align="center" style:justify-single-word="false"/>
    </style:style>
    <style:style style:name="P58" style:family="paragraph" style:parent-style-name="Heading_20_4">
      <style:text-properties fo:font-size="14pt" officeooo:paragraph-rsid="0003176b" style:font-size-asian="14pt" style:font-size-complex="14pt"/>
    </style:style>
    <style:style style:name="P59" style:family="paragraph" style:parent-style-name="Preformatted_20_Text">
      <style:text-properties style:font-name="Noto Serif" fo:font-size="12pt" style:font-size-asian="12pt" style:font-size-complex="12pt"/>
    </style:style>
    <style:style style:name="P60" style:family="paragraph" style:parent-style-name="Preformatted_20_Text">
      <style:paragraph-properties fo:line-height="150%" fo:text-align="center" style:justify-single-word="false"/>
      <style:text-properties style:font-name="Noto Serif" fo:font-size="12pt" officeooo:paragraph-rsid="003354c4" style:font-size-asian="12pt" style:font-size-complex="12pt"/>
    </style:style>
    <style:style style:name="P61" style:family="paragraph" style:parent-style-name="Preformatted_20_Text">
      <style:paragraph-properties fo:text-align="justify" style:justify-single-word="false"/>
      <style:text-properties style:font-name="Noto Serif" fo:font-size="12pt" officeooo:rsid="003354c4" officeooo:paragraph-rsid="003354c4" fo:background-color="#ffbf00" style:font-size-asian="12pt" style:font-size-complex="12pt"/>
    </style:style>
    <style:style style:name="P62" style:family="paragraph" style:parent-style-name="Preformatted_20_Text">
      <style:paragraph-properties fo:text-align="justify" style:justify-single-word="false"/>
      <style:text-properties style:font-name="Noto Serif" fo:font-size="12pt" officeooo:rsid="003354c4" officeooo:paragraph-rsid="00363556" fo:background-color="#ffbf00" style:font-size-asian="12pt" style:font-size-complex="12pt"/>
    </style:style>
    <style:style style:name="P63" style:family="paragraph" style:parent-style-name="Preformatted_20_Text">
      <style:paragraph-properties fo:text-align="justify" style:justify-single-word="false"/>
      <style:text-properties style:font-name="Noto Serif" fo:font-size="12pt" officeooo:paragraph-rsid="00363556" fo:background-color="#ffbf00" style:font-size-asian="12pt" style:font-size-complex="12pt"/>
    </style:style>
    <style:style style:name="P64" style:family="paragraph" style:parent-style-name="Preformatted_20_Text">
      <style:paragraph-properties fo:text-align="justify" style:justify-single-word="false"/>
      <style:text-properties style:font-name="Noto Serif" fo:font-size="12pt" officeooo:rsid="0036290a" officeooo:paragraph-rsid="0036290a" fo:background-color="#ffbf00" style:font-size-asian="12pt" style:font-size-complex="12pt"/>
    </style:style>
    <style:style style:name="P65" style:family="paragraph" style:parent-style-name="Preformatted_20_Text">
      <style:paragraph-properties fo:text-align="justify" style:justify-single-word="false"/>
      <style:text-properties style:font-name="Noto Serif" fo:font-size="12pt" officeooo:rsid="0036290a" officeooo:paragraph-rsid="00363556" fo:background-color="#ffbf00" style:font-size-asian="12pt" style:font-size-complex="12pt"/>
    </style:style>
    <style:style style:name="P66" style:family="paragraph" style:parent-style-name="Preformatted_20_Text">
      <style:paragraph-properties fo:line-height="100%" fo:text-align="justify" style:justify-single-word="false"/>
      <style:text-properties style:font-name="Noto Serif" fo:font-size="12pt" officeooo:rsid="00363556" officeooo:paragraph-rsid="00363556" fo:background-color="#ffbf00" style:font-size-asian="12pt" style:font-size-complex="12pt"/>
    </style:style>
    <style:style style:name="P67" style:family="paragraph" style:parent-style-name="Preformatted_20_Text">
      <style:paragraph-properties fo:text-align="justify" style:justify-single-word="false"/>
      <style:text-properties style:font-name="Noto Serif" fo:font-size="14pt" officeooo:rsid="003354c4" officeooo:paragraph-rsid="00363556" fo:background-color="#ffbf00" style:font-size-asian="14pt" style:font-size-complex="14pt"/>
    </style:style>
    <style:style style:name="P68" style:family="paragraph" style:parent-style-name="Preformatted_20_Text">
      <style:paragraph-properties fo:text-align="center" style:justify-single-word="false"/>
      <style:text-properties style:font-name="Noto Serif" fo:font-size="14pt" officeooo:rsid="003354c4" officeooo:paragraph-rsid="00363556" fo:background-color="#ff4000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94e37"/>
    </style:style>
    <style:style style:name="T4" style:family="text">
      <style:text-properties style:font-name="Nimbus Sans" fo:font-size="14pt" style:font-size-asian="14pt" style:font-size-complex="14pt"/>
    </style:style>
    <style:style style:name="T5" style:family="text">
      <style:text-properties style:font-name="Nimbus Sans" fo:font-size="14pt" officeooo:rsid="00098f55" style:font-size-asian="14pt" style:font-size-complex="14pt"/>
    </style:style>
    <style:style style:name="T6" style:family="text">
      <style:text-properties style:font-name="Nimbus Sans" fo:font-size="14pt" officeooo:rsid="0009ef3a" style:font-size-asian="14pt" style:font-size-complex="14pt"/>
    </style:style>
    <style:style style:name="T7" style:family="text">
      <style:text-properties style:font-name="Nimbus Sans" fo:font-size="14pt" officeooo:rsid="000d67c3" style:font-size-asian="14pt" style:font-size-complex="14pt"/>
    </style:style>
    <style:style style:name="T8" style:family="text">
      <style:text-properties style:font-name="Nimbus Sans" fo:font-size="14pt" fo:background-color="transparent" loext:char-shading-value="0" style:font-size-asian="14pt" style:font-size-complex="14pt"/>
    </style:style>
    <style:style style:name="T9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Nimbus Sans" fo:font-size="14pt" fo:font-weight="bold" officeooo:rsid="0011655d" fo:background-color="#cccccc" loext:char-shading-value="0" style:font-size-asian="14pt" style:font-weight-asian="bold" style:font-size-complex="14pt" style:font-weight-complex="bold"/>
    </style:style>
    <style:style style:name="T14" style:family="text">
      <style:text-properties style:font-name="Nimbus Sans" fo:background-color="#cccccc" loext:char-shading-value="0"/>
    </style:style>
    <style:style style:name="T15" style:family="text">
      <style:text-properties style:font-name="Nimbus Sans" officeooo:rsid="00211f2f" fo:background-color="#cccccc" loext:char-shading-value="0"/>
    </style:style>
    <style:style style:name="T16" style:family="text">
      <style:text-properties officeooo:rsid="00098e83"/>
    </style:style>
    <style:style style:name="T17" style:family="text">
      <style:text-properties officeooo:rsid="0011659a"/>
    </style:style>
    <style:style style:name="T18" style:family="text">
      <style:text-properties style:font-name="Noto Sans Display" fo:background-color="#cccccc" loext:char-shading-value="0"/>
    </style:style>
    <style:style style:name="T19" style:family="text">
      <style:text-properties style:font-name="Noto Sans Display" officeooo:rsid="0011659a" fo:background-color="#cccccc" loext:char-shading-value="0"/>
    </style:style>
    <style:style style:name="T20" style:family="text">
      <style:text-properties style:font-name="Noto Sans Display" officeooo:rsid="001b241e" fo:background-color="#cccccc" loext:char-shading-value="0"/>
    </style:style>
    <style:style style:name="T21" style:family="text">
      <style:text-properties style:font-name="Noto Sans Display" officeooo:rsid="00211f2f" fo:background-color="#cccccc" loext:char-shading-value="0"/>
    </style:style>
    <style:style style:name="T22" style:family="text">
      <style:text-properties style:font-name="Noto Sans Display" officeooo:rsid="002795fe" fo:background-color="#cccccc" loext:char-shading-value="0"/>
    </style:style>
    <style:style style:name="T23" style:family="text">
      <style:text-properties style:font-name="Noto Sans Display" fo:font-size="15pt" fo:background-color="#cccccc" loext:char-shading-value="0" style:font-size-asian="15pt" style:font-size-complex="15pt"/>
    </style:style>
    <style:style style:name="T24" style:family="text">
      <style:text-properties style:font-name="Noto Sans Display" fo:font-size="15pt" officeooo:rsid="00211f2f" fo:background-color="#cccccc" loext:char-shading-value="0" style:font-size-asian="15pt" style:font-size-complex="15pt"/>
    </style:style>
    <style:style style:name="T25" style:family="text">
      <style:text-properties style:font-name="Noto Sans Display" fo:font-size="15pt" officeooo:rsid="002152e8" fo:background-color="#cccccc" loext:char-shading-value="0" style:font-size-asian="15pt" style:font-size-complex="15pt"/>
    </style:style>
    <style:style style:name="T26" style:family="text">
      <style:text-properties style:font-name="Noto Sans Display" fo:font-size="15pt" officeooo:rsid="001581aa" fo:background-color="transparent" loext:char-shading-value="0" style:font-size-asian="15pt" style:font-size-complex="15pt"/>
    </style:style>
    <style:style style:name="T27" style:family="text">
      <style:text-properties style:font-name="Noto Sans Display" fo:font-size="15pt" officeooo:rsid="0017cb30" fo:background-color="transparent" loext:char-shading-value="0" style:font-size-asian="15pt" style:font-size-complex="15pt"/>
    </style:style>
    <style:style style:name="T28" style:family="text">
      <style:text-properties style:font-name="Noto Sans Display" fo:font-size="15pt" officeooo:rsid="0019488e" fo:background-color="transparent" loext:char-shading-value="0" style:font-size-asian="15pt" style:font-size-complex="15pt"/>
    </style:style>
    <style:style style:name="T29" style:family="text">
      <style:text-properties style:font-name="Noto Sans Display" fo:font-size="15pt" officeooo:rsid="002152e8" fo:background-color="transparent" loext:char-shading-value="0" style:font-size-asian="15pt" style:font-size-complex="15pt"/>
    </style:style>
    <style:style style:name="T30" style:family="text">
      <style:text-properties style:font-name="Noto Sans Display" fo:font-size="15pt" style:text-underline-style="solid" style:text-underline-width="auto" style:text-underline-color="font-color" fo:font-weight="bold" officeooo:rsid="002152e8" fo:background-color="transparent" loext:char-shading-value="0" style:font-size-asian="15pt" style:font-weight-asian="bold" style:font-size-complex="15pt" style:font-weight-complex="bold"/>
    </style:style>
    <style:style style:name="T31" style:family="text">
      <style:text-properties style:font-name="Noto Sans Display" fo:font-size="15pt" style:text-underline-style="none" fo:font-weight="normal" officeooo:rsid="002152e8" fo:background-color="transparent" loext:char-shading-value="0" style:font-size-asian="15pt" style:font-weight-asian="normal" style:font-size-complex="15pt" style:font-weight-complex="normal"/>
    </style:style>
    <style:style style:name="T32" style:family="text">
      <style:text-properties style:font-name="Noto Sans Display" fo:font-size="16pt" officeooo:rsid="0017cb30" fo:background-color="#cccccc" loext:char-shading-value="0" style:font-size-asian="16pt" style:font-size-complex="16pt"/>
    </style:style>
    <style:style style:name="T33" style:family="text">
      <style:text-properties style:font-name="Noto Sans Display" fo:font-size="16pt" officeooo:rsid="001b841c" fo:background-color="#cccccc" loext:char-shading-value="0" style:font-size-asian="16pt" style:font-size-complex="16pt"/>
    </style:style>
    <style:style style:name="T34" style:family="text">
      <style:text-properties style:font-name="Noto Sans Display" fo:font-weight="normal" fo:background-color="#cccccc" loext:char-shading-value="0" style:font-weight-asian="normal" style:font-weight-complex="normal"/>
    </style:style>
    <style:style style:name="T35" style:family="text">
      <style:text-properties style:font-name="Noto Sans Display" fo:font-weight="normal" officeooo:rsid="0011655d" fo:background-color="#cccccc" loext:char-shading-value="0" style:font-weight-asian="normal" style:font-weight-complex="normal"/>
    </style:style>
    <style:style style:name="T36" style:family="text">
      <style:text-properties style:font-name="Noto Sans Display" fo:font-size="14pt" fo:font-weight="normal" officeooo:rsid="0011655d" style:font-size-asian="14pt" style:font-weight-asian="normal" style:font-size-complex="14pt" style:font-weight-complex="normal"/>
    </style:style>
    <style:style style:name="T37" style:family="text">
      <style:text-properties style:font-name="Noto Sans Display" officeooo:rsid="0011659a"/>
    </style:style>
    <style:style style:name="T38" style:family="text">
      <style:text-properties style:font-name="Noto Sans Display" officeooo:rsid="0024590d"/>
    </style:style>
    <style:style style:name="T39" style:family="text">
      <style:text-properties fo:font-size="15pt" officeooo:rsid="0019488e" fo:background-color="transparent" loext:char-shading-value="0" style:font-size-asian="15pt" style:font-size-complex="15pt"/>
    </style:style>
    <style:style style:name="T40" style:family="text">
      <style:text-properties fo:font-size="15pt" officeooo:rsid="001b841c" fo:background-color="transparent" loext:char-shading-value="0" style:font-size-asian="15pt" style:font-size-complex="15pt"/>
    </style:style>
    <style:style style:name="T41" style:family="text">
      <style:text-properties officeooo:rsid="0012d0b4"/>
    </style:style>
    <style:style style:name="T42" style:family="text">
      <style:text-properties officeooo:rsid="001b241e"/>
    </style:style>
    <style:style style:name="T43" style:family="text">
      <style:text-properties officeooo:rsid="001b841c"/>
    </style:style>
    <style:style style:name="T44" style:family="text">
      <style:text-properties officeooo:rsid="00211f2f"/>
    </style:style>
    <style:style style:name="T45" style:family="text">
      <style:text-properties officeooo:rsid="002795fe"/>
    </style:style>
    <style:style style:name="T46" style:family="text">
      <style:text-properties officeooo:rsid="002abc33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354c4" style:font-weight-asian="bold" style:font-weight-complex="bold"/>
    </style:style>
    <style:style style:name="T49" style:family="text">
      <style:text-properties fo:font-weight="bold" officeooo:rsid="0038105c" style:font-weight-asian="bold" style:font-weight-complex="bold"/>
    </style:style>
    <style:style style:name="T50" style:family="text">
      <style:text-properties officeooo:rsid="0031f55f"/>
    </style:style>
    <style:style style:name="T51" style:family="text">
      <style:text-properties officeooo:rsid="003354c4"/>
    </style:style>
    <style:style style:name="T52" style:family="text">
      <style:text-properties style:font-name="Noto Serif" fo:font-size="12pt" officeooo:rsid="003354c4" style:font-size-asian="12pt" style:font-size-complex="12pt"/>
    </style:style>
    <style:style style:name="T53" style:family="text">
      <style:text-properties style:font-name="Noto Serif" fo:font-size="12pt" officeooo:rsid="00057da7" style:font-size-asian="12pt" style:font-size-complex="12pt"/>
    </style:style>
    <style:style style:name="T54" style:family="text">
      <style:text-properties style:font-name="Noto Serif" fo:font-size="12pt" officeooo:rsid="000f60ab" style:font-size-asian="12pt" style:font-size-complex="12pt"/>
    </style:style>
    <style:style style:name="T55" style:family="text">
      <style:text-properties style:font-name="Noto Serif" fo:font-size="12pt" officeooo:rsid="00363556" fo:background-color="#ffbf00" loext:char-shading-value="0" style:font-size-asian="12pt" style:font-size-complex="12pt"/>
    </style:style>
    <style:style style:name="T56" style:family="text">
      <style:text-properties officeooo:rsid="00363556"/>
    </style:style>
    <style:style style:name="T57" style:family="text">
      <style:text-properties officeooo:rsid="00363a9f"/>
    </style:style>
    <style:style style:name="T58" style:family="text">
      <style:text-properties officeooo:rsid="0037ca95"/>
    </style:style>
    <style:style style:name="T59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48">Actu 2026-0</text:span><text:span text:style-name="T49">7-04</text:span><text:span text:style-name="T48"> </text:span><text:span text:style-name="T51">: Problème de compatibilité entre les .ui ancien et le .ui nouveau (Qt6.8.3) pour le moment biblioteq_batch_activities_browser.ui est touché (Github #464) !</text:span></text:p>
      <text:p text:style-name="P67"/>
      <text:p text:style-name="P68"><text:span text:style-name="T57">PAS DE SOLUTION POUR LINUXMINT </text:span><text:span text:style-name="T58">22.3 </text:span><text:span text:style-name="T57">POUR LE MOMENT </text:span><text:span text:style-name="T58">(2026-07-04)</text:span>.</text:p>
      <text:p text:style-name="P68"/>
      <text:p text:style-name="P62"><text:span text:style-name="T59">→ Dernière version sans problème UI : biblioteq-2026.05.25.tar.gz</text:span></text:p>
      <text:p text:style-name="P62"/>
      <text:p text:style-name="P65">LinuxMint 22.3 propose Qt6.4.2 mais cela n’est pas suffisant !</text:p>
      <text:p text:style-name="P66"><text:span text:style-name="T55">Si installation manuelle de Qt6.10 → problème avec ouverture base incompatible avec le reste du système LinuxMint 22.3</text:span></text:p>
      <text:h text:style-name="P57" text:outline-level="3">POUR COMPILER BIBLIOTEQ DEPUIS LES SOURCES <text:span text:style-name="T1">DE GITHUB</text:span>.</text:h>
      <text:p text:style-name="P60"><text:span text:style-name="T52">Le nom des paquets concerne </text:span><text:span text:style-name="T53">la distribution </text:span><text:span text:style-name="T52">LinuxMint2</text:span><text:span text:style-name="T54">2.</text:span><text:span text:style-name="T52">3</text:span></text:p>
      <text:h text:style-name="Heading_20_3" text:outline-level="3"><text:span text:style-name="T2">1 - </text:span>Installation des dépendances pour compiler BiblioteQ</text:h>
      <text:p text:style-name="P18">sudo apt-get install git</text:p>
      <text:p text:style-name="P18">sudo apt-get install build-essential</text:p>
      <text:p text:style-name="P18">sudo apt-get install qtbase5-dev</text:p>
      <text:p text:style-name="P18">sudo apt-get install libsqlite3-dev</text:p>
      <text:p text:style-name="P18">sudo apt-get install libyazpp-dev</text:p>
      <text:p text:style-name="P18">sudo apt-get install libpoppler-cpp-dev</text:p>
      <text:p text:style-name="P18">sudo apt-get install libqt5multimedia5-plugins</text:p>
      <text:p text:style-name="P18">sudo apt-get install qtmultimedia5-dev</text:p>
      <text:p text:style-name="P19">sudo apt-get install qtpdf5-dev</text:p>
      <text:p text:style-name="P20">sudo apt-get install <text:span text:style-name="T50">libpq5</text:span></text:p>
      <text:p text:style-name="P20">sudo apt-get install <text:span text:style-name="T50">libqt5sql5-psql</text:span></text:p>
      <text:p text:style-name="P18">sudo ldconfig</text:p>
      <text:p text:style-name="P3"/>
      <text:h text:style-name="Heading_20_3" text:outline-level="3"><text:span text:style-name="T2">2 - </text:span>Téléchargement des sources de BiblioteQ.</text:h>
      <text:p text:style-name="P4">git clone https://github.com/textbrowser/biblioteq.git</text:p>
      <text:p text:style-name="P1"/>
      <text:h text:style-name="P58" text:outline-level="4"><text:span text:style-name="T2">3 - </text:span>Compilation de BiblioteQ.</text:h>
      <text:p text:style-name="P2"><text:s/>L'option -j permet de compiler avec plusieurs processeurs.</text:p>
      <text:p text:style-name="P18">cd biblioteq</text:p>
      <text:p text:style-name="P18">qmake</text:p>
      <text:p text:style-name="P18">make -j4</text:p>
      <text:h text:style-name="Heading_20_3" text:outline-level="3"><text:span text:style-name="T2">4 - C</text:span>réation du paquet .deb version amd64.</text:h>
      <text:p text:style-name="P17">./Distributions/build_debian_amd64.bash</text:p>
      <text:h text:style-name="P54" text:outline-level="3"><text:soft-page-break/>POUR CRÉER OU METTRE À JOUR LA TRADUCTION.</text:h>
      <text:p text:style-name="P1"/>
      <text:h text:style-name="Heading_20_3" text:outline-level="3"><text:span text:style-name="T2">1 - I</text:span>nstallation des outils pour effectuer la traduction.</text:h>
      <text:p text:style-name="P17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17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17">linguist Translations/biblioteq_fr_Fr.ts</text:p>
      <text:p text:style-name="P1"/>
      <text:p text:style-name="P1"/>
      <text:p text:style-name="P5">Exporter vers le format de fichier biblioteq_fr_FR.qm (qm) et compiler BiblioteQ pour profiter de la traduction des menus.</text:p>
      <text:p text:style-name="P5"/>
      <text:h text:style-name="P55" text:outline-level="3"/>
      <text:h text:style-name="P55" text:outline-level="3"/>
      <text:h text:style-name="P56" text:outline-level="3"><text:span text:style-name="T3">P</text:span>OUR <text:span text:style-name="T3">OBTENIR L’ANIMATION </text:span><text:span text:style-name="T16">DE CONFIRMATION </text:span><text:span text:style-name="T3">SUR LES BOUTONS.</text:span></text:h>
      <text:p text:style-name="P36"/>
      <text:p text:style-name="P32"><text:span text:style-name="T4">1 – Par défaut LinuxMint 21.3 applique le style « gtk2 ». </text:span><text:span text:style-name="T5">Celui-ci ne permet pas de voir les boutons animés. Il faut donc chang</text:span><text:span text:style-name="T4">er le style pour bénéficier des boutons animés de confirmation.</text:span></text:p>
      <text:p text:style-name="P33"><text:span text:style-name="T5">2</text:span><text:span text:style-name="T4"> – la commande </text:span><text:span text:style-name="T6">suiv</text:span><text:span text:style-name="T7">a</text:span><text:span text:style-name="T6">nte </text:span><text:span text:style-name="T8">permet de spécifier le style.</text:span></text:p>
      <text:p text:style-name="P39">qt5ct</text:p>
      <text:p text:style-name="P34"><text:span text:style-name="T10">3</text:span><text:span text:style-name="T8"> – Choisir </text:span><text:span text:style-name="T9">le style </text:span><text:span text:style-name="T12">Fusion</text:span><text:span text:style-name="T8"> ou </text:span><text:span text:style-name="T9">le style </text:span><text:span text:style-name="T12">Breeze</text:span><text:span text:style-name="T8">.</text:span></text:p>
      <text:p text:style-name="P35"><text:span text:style-name="T10">4</text:span><text:span text:style-name="T8"> – Si </text:span><text:span text:style-name="T10">le style </text:span><text:span text:style-name="T8">Breeze n’est pas installé </text:span><text:span text:style-name="T10">sur le systè</text:span><text:span text:style-name="T11">m</text:span><text:span text:style-name="T10">e.</text:span></text:p>
      <text:p text:style-name="P40">sudo apt-get install breeze</text:p>
      <text:p text:style-name="P37"/>
      <text:p text:style-name="P37"/>
      <text:p text:style-name="P6"/>
      <text:p text:style-name="P52">POUR POUVOIR UTILISER LA FONCTIONNALITÉ <text:span text:style-name="T46">HYPERLIEN (</text:span>ALT + LIEN <text:span text:style-name="T46">en bleu).</text:span></text:p>
      <text:p text:style-name="P51"/>
      <text:p text:style-name="P53">Dans LinuxMint Bureau Mate , il faut modifier :</text:p>
      <text:p text:style-name="P53">Préférence/Windows … Touche de mouvement et remplacer Alt par Super (ou logo Windows).</text:p>
      <text:p text:style-name="P38"><text:span text:style-name="T47"/></text:p>
      <text:p text:style-name="P43">TRIE AVEC DES LETTRES ACCENTUÉES DANS LES REQUÊTES SQL</text:p>
      <text:p text:style-name="P45"/>
      <text:p text:style-name="P45">par exemple pour le mode Icône</text:p>
      <text:p text:style-name="P45"/>
      <text:p text:style-name="P44">Configurer la base avec le Encodage PRAGMA UTF-8</text:p>
      <text:p text:style-name="P48">- BQ/<text:span text:style-name="T17">menu/</text:span>Autres Options/SQLite/ E<text:span text:style-name="T42">ncodage PRAGMA (</text:span><text:span text:style-name="T43">menu déroulant)</text:span>.</text:p>
      <text:p text:style-name="P46"/>
      <text:p text:style-name="P21">Il faut avoir l’extension <text:span text:style-name="T43">de</text:span> sqlite avec la librairie libicu.so chargé dans BiblioteQ,</text:p>
      <text:p text:style-name="P21">- BQ/<text:span text:style-name="T17">menu/</text:span>Autres Options/SQLite/ Extensions chargeables à l’éx<text:span text:style-name="T42">é</text:span>cution.</text:p>
      <text:p text:style-name="P21"/>
      <text:p text:style-name="P28">Pour avoir libicu.so</text:p>
      <text:p text:style-name="P24">1 - Installer le nécessaire pour compiler</text:p>
      <text:p text:style-name="P7"><text:span text:style-name="Source_20_Text"><text:span text:style-name="T35">sudo apt install libicu-dev libsqlite3-dev dpkg-dev gcc make pkg-config</text:span></text:span></text:p>
      <text:p text:style-name="P21"/>
      <text:p text:style-name="P24">2 – Installer les sources de sqlite3 (extensions)</text:p>
      <text:p text:style-name="P7"><text:span text:style-name="Source_20_Text"><text:span text:style-name="T18">apt-get source sqlite3</text:span></text:span></text:p>
      <text:p text:style-name="P47"><text:span text:style-name="Source_20_Text"><text:span text:style-name="T36"/></text:span></text:p>
      <text:p text:style-name="P47"><text:span text:style-name="Source_20_Text"><text:span text:style-name="T37">3 – Compilation et Installation</text:span></text:span></text:p>
      <text:p text:style-name="P7"><text:span text:style-name="Source_20_Text"><text:span text:style-name="T18">cd sqlite3-*/ext/icu</text:span></text:span></text:p>
      <text:p text:style-name="P7"><text:span text:style-name="Source_20_Text"><text:span text:style-name="T23">gcc -fPIC -shared icu.c `pkg-config --libs --cflags icu-uc icu-io` -o libicu.so</text:span></text:span></text:p>
      <text:p text:style-name="P7"><text:span text:style-name="Source_20_Text"><text:span text:style-name="T18">sudo cp libicu.so /usr/local/lib/</text:span></text:span></text:p>
      <text:p text:style-name="P7"><text:span text:style-name="Source_20_Text"><text:span text:style-name="T18">sudo ldconfig</text:span></text:span></text:p>
      <text:p text:style-name="P30"/>
      <text:p text:style-name="P30"/>
      <text:p text:style-name="P26">4 – Configuration de BiblioteQ</text:p>
      <text:p text:style-name="P22"><text:span text:style-name="T17">menu/</text:span>Autres Options/SQLite/ Extensions chargeables à l’éx<text:span text:style-name="T41">é</text:span>cution.</text:p>
      <text:p text:style-name="P8"><text:span text:style-name="Source_20_Text"><text:span text:style-name="T18">/usr/local/lib/</text:span></text:span><text:span text:style-name="Source_20_Text"><text:span text:style-name="T23">libicu.so</text:span></text:span></text:p>
      <text:p text:style-name="P8"><text:span text:style-name="Source_20_Text"><text:span text:style-name="T23"/></text:span></text:p>
      <text:p text:style-name="P9"><text:span text:style-name="Source_20_Text"><text:span text:style-name="T26">Vérification Commande SQL dans BiblioteQ</text:span></text:span></text:p>
      <text:p text:style-name="P10"><text:span text:style-name="Source_20_Text"><text:span text:style-name="T23">SELECT icu_load_collation('','ICU');</text:span></text:span></text:p>
      <text:p text:style-name="P10"><text:span text:style-name="Source_20_Text"><text:span text:style-name="T23">PRAGMA collation_list;</text:span></text:span></text:p>
      <text:p text:style-name="P11"><text:span text:style-name="Source_20_Text"><text:span text:style-name="T27">ICU devrait</text:span></text:span><text:span text:style-name="Source_20_Text"><text:span text:style-name="T26"> </text:span></text:span><text:span text:style-name="Source_20_Text"><text:span text:style-name="T27">apparaître </text:span></text:span><text:span text:style-name="Source_20_Text"><text:span text:style-name="T28">en plus avec RTRIM ; NOCASE ; BINARY</text:span></text:span></text:p>
      <text:p text:style-name="P11"><text:span text:style-name="Source_20_Text"><text:span text:style-name="T27"/></text:span></text:p>
      <text:p text:style-name="P15"><text:span text:style-name="Source_20_Text"><text:span text:style-name="T30">Exemples</text:span></text:span></text:p>
      <text:p text:style-name="P12"><text:span text:style-name="Source_20_Text"><text:span text:style-name="Strong_20_Emphasis"><text:span text:style-name="T39">Trier par titre</text:span></text:span></text:span><text:span text:style-name="Source_20_Text"><text:span text:style-name="T27"><text:line-break/></text:span></text:span><text:span text:style-name="Source_20_Text"><text:span text:style-name="T32">SELECT front_cover FROM book ORDER by </text:span></text:span><text:span text:style-name="Source_20_Text"><text:span text:style-name="T33">title</text:span></text:span><text:span text:style-name="Source_20_Text"><text:span text:style-name="T32"> COLLATE ICU;</text:span></text:span></text:p>
      <text:p text:style-name="P12"><text:span text:style-name="Strong_20_Emphasis"><text:span text:style-name="T40">Trier par auteur</text:span></text:span></text:p>
      <text:p text:style-name="P50"><text:span text:style-name="Source_20_Text"><text:span text:style-name="T32">SELECT front_cover FROM book ORDER by </text:span></text:span><text:span text:style-name="Source_20_Text"><text:span text:style-name="T33">author</text:span></text:span><text:span text:style-name="Source_20_Text"><text:span text:style-name="T32"> COLLATE ICU;</text:span></text:span></text:p>
      <text:p text:style-name="P41"><text:span text:style-name="Source_20_Text"><text:span text:style-name="T15">UTILISER REGEXP D</text:span></text:span><text:span text:style-name="Source_20_Text"><text:span text:style-name="T14">ANS LES REQUÊTES SQL</text:span></text:span></text:p>
      <text:p text:style-name="P42"><text:span text:style-name="Source_20_Text"><text:span text:style-name="T13"/></text:span></text:p>
      <text:p text:style-name="P23">Il faut avoir l’extension <text:span text:style-name="T43">de</text:span> sqlite avec la librairie lib<text:span text:style-name="T44">regexp.</text:span>so chargé dans BiblioteQ.</text:p>
      <text:p text:style-name="P23"><text:span text:style-name="Source_20_Text"><text:span text:style-name="T18">- BQ/</text:span></text:span><text:span text:style-name="Source_20_Text"><text:span text:style-name="T19">menu/</text:span></text:span><text:span text:style-name="Source_20_Text"><text:span text:style-name="T18">Autres Options/SQLite/ Extensions chargeables à l’éx</text:span></text:span><text:span text:style-name="Source_20_Text"><text:span text:style-name="T20">é</text:span></text:span><text:span text:style-name="Source_20_Text"><text:span text:style-name="T18">cution.</text:span></text:span></text:p>
      <text:p text:style-name="P23"><text:span text:style-name="Source_20_Text"><text:span text:style-name="T34"/></text:span></text:p>
      <text:p text:style-name="P29"><text:span text:style-name="T45">P</text:span>our avoir lib<text:span text:style-name="T45">regexp</text:span>.so</text:p>
      <text:p text:style-name="P25">1 - Installer le nécessaire pour compiler</text:p>
      <text:p text:style-name="P13"><text:span text:style-name="Source_20_Text"><text:span text:style-name="T35">sudo apt install libsqlite3-dev dpkg-dev gcc make pkg-config</text:span></text:span></text:p>
      <text:p text:style-name="P23"/>
      <text:p text:style-name="P25">2 – Installer les sources de sqlite3 (extensions)</text:p>
      <text:p text:style-name="P13"><text:span text:style-name="Source_20_Text"><text:span text:style-name="T18">apt-get source sqlite3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7">3 – Compilation et Installation </text:span></text:span><text:span text:style-name="Source_20_Text"><text:span text:style-name="T38">(</text:span></text:span><text:a xlink:type="simple" xlink:href="https://sqlite.org/loadext.html" text:style-name="Internet_20_link" text:visited-style-name="Visited_20_Internet_20_Link"><text:span text:style-name="Source_20_Text"><text:span text:style-name="T38">https://sqlite.org/loadext.html</text:span></text:span></text:a><text:span text:style-name="Source_20_Text"><text:span text:style-name="T38"> paragraphe 3).</text:span></text:span></text:p>
      <text:p text:style-name="P13"><text:span text:style-name="Source_20_Text"><text:span text:style-name="T18">cd sqlite3-*/ext/</text:span></text:span><text:span text:style-name="Source_20_Text"><text:span text:style-name="T22">misc</text:span></text:span></text:p>
      <text:p text:style-name="P13"><text:span text:style-name="Source_20_Text"><text:span text:style-name="T23">gcc -fPIC -shared </text:span></text:span><text:span text:style-name="Source_20_Text"><text:span text:style-name="T24">regexp.c</text:span></text:span><text:span text:style-name="Source_20_Text"><text:span text:style-name="T23"> -o lib</text:span></text:span><text:span text:style-name="Source_20_Text"><text:span text:style-name="T24">regexp</text:span></text:span><text:span text:style-name="Source_20_Text"><text:span text:style-name="T23">.so </text:span></text:span></text:p>
      <text:p text:style-name="P13"><text:span text:style-name="Source_20_Text"><text:span text:style-name="T18">sudo cp lib</text:span></text:span><text:span text:style-name="Source_20_Text"><text:span text:style-name="T21">regexp</text:span></text:span><text:span text:style-name="Source_20_Text"><text:span text:style-name="T18">.so /usr/local/lib/</text:span></text:span></text:p>
      <text:p text:style-name="P13"><text:span text:style-name="Source_20_Text"><text:span text:style-name="T18">sudo ldconfig</text:span></text:span></text:p>
      <text:p text:style-name="P31"/>
      <text:p text:style-name="P31"/>
      <text:p text:style-name="P27">4 – Configuration de BiblioteQ</text:p>
      <text:p text:style-name="P23"><text:span text:style-name="T17">menu/</text:span>Autres Options/SQLite/ Extensions chargeables à l’éx<text:span text:style-name="T41">é</text:span>cution.</text:p>
      <text:p text:style-name="P13"><text:span text:style-name="Source_20_Text"><text:span text:style-name="T18">/usr/local/lib/</text:span></text:span><text:span text:style-name="Source_20_Text"><text:span text:style-name="T23">lib</text:span></text:span><text:span text:style-name="Source_20_Text"><text:span text:style-name="T24">regexp</text:span></text:span><text:span text:style-name="Source_20_Text"><text:span text:style-name="T23">.so</text:span></text:span></text:p>
      <text:p text:style-name="P13"><text:span text:style-name="Source_20_Text"><text:span text:style-name="T23"/></text:span></text:p>
      <text:p text:style-name="P14"><text:span text:style-name="Source_20_Text"><text:span text:style-name="T29">5 - </text:span></text:span><text:span text:style-name="Source_20_Text"><text:span text:style-name="T26">Vérifi</text:span></text:span><text:span text:style-name="Source_20_Text"><text:span text:style-name="T29">er que l’extension est bien chargées</text:span></text:span><text:span text:style-name="Source_20_Text"><text:span text:style-name="T26"> </text:span></text:span><text:span text:style-name="Source_20_Text"><text:span text:style-name="T29">BQ/Ctrl+L</text:span></text:span></text:p>
      <text:p text:style-name="P14"><text:span text:style-name="Source_20_Text"><text:span text:style-name="T29"/></text:span></text:p>
      <text:p text:style-name="P15"><text:span text:style-name="Source_20_Text"><text:span text:style-name="T30">Exemples personnel</text:span></text:span></text:p>
      <text:p text:style-name="P16"><text:span text:style-name="Source_20_Text"><text:span text:style-name="T31">Avoir tout les documentaires (COTE avec un numéro)</text:span></text:span></text:p>
      <text:p text:style-name="P14"><text:span text:style-name="Source_20_Text"><text:span text:style-name="T25">SELECT callnumber,title FROM book WHERE callnumber REGEXP '(^[0-9])';</text:span></text:span></text:p>
      <text:p text:style-name="P14"><text:span text:style-name="Source_20_Text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4T19:08:41.729832437</dc:date>
    <meta:editing-duration>PT1H38M57S</meta:editing-duration>
    <meta:editing-cycles>42</meta:editing-cycles>
    <meta:generator>LibreOffice/24.2.7.2$Linux_X86_64 LibreOffice_project/420$Build-2</meta:generator>
    <meta:document-statistic meta:table-count="0" meta:image-count="0" meta:object-count="0" meta:page-count="4" meta:paragraph-count="94" meta:word-count="628" meta:character-count="4488" meta:non-whitespace-character-count="3943"/>
  </office:meta>
</office:document-meta>
</file>